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D0000014EF21A67F6AA9B7891.png" manifest:media-type="image/png"/>
  <manifest:file-entry manifest:full-path="Pictures/100000000000031F00000228560243FFFE36C05B.png" manifest:media-type="image/png"/>
  <manifest:file-entry manifest:full-path="Pictures/10000000000002EE000001B8E5373C417CFBF08A.png" manifest:media-type="image/png"/>
  <manifest:file-entry manifest:full-path="Pictures/10000000000006360000012940BAE9A8DC1C635C.png" manifest:media-type="image/png"/>
  <manifest:file-entry manifest:full-path="Pictures/10000000000002AF00000144BCD612EEF099793E.png" manifest:media-type="image/png"/>
  <manifest:file-entry manifest:full-path="Pictures/1000000000000179000000A52C28D7619722856F.png" manifest:media-type="image/png"/>
  <manifest:file-entry manifest:full-path="Pictures/10000000000002FC0000020C013701A7234A52F6.png" manifest:media-type="image/png"/>
  <manifest:file-entry manifest:full-path="Pictures/1000000000000688000003ADEB041BD1D405BEA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20pt" style:font-size-asian="20pt" style:font-size-complex="20pt"/>
    </style:style>
    <style:style style:name="P2" style:family="paragraph" style:parent-style-name="Heading_20_2">
      <style:paragraph-properties fo:text-align="center" style:justify-single-word="false"/>
      <style:text-properties fo:font-size="20pt" officeooo:rsid="000e3dce" officeooo:paragraph-rsid="000e3dce" style:font-size-asian="20pt" style:font-size-complex="20pt"/>
    </style:style>
    <style:style style:name="P3" style:family="paragraph" style:parent-style-name="Heading_20_2">
      <style:paragraph-properties fo:text-align="center" style:justify-single-word="false"/>
      <style:text-properties fo:font-size="22pt" officeooo:rsid="000e3dce" officeooo:paragraph-rsid="000e3dce" style:font-size-asian="22pt" style:font-size-complex="22pt"/>
    </style:style>
    <style:style style:name="P4" style:family="paragraph" style:parent-style-name="Heading_20_2">
      <style:paragraph-properties fo:text-align="center" style:justify-single-word="false"/>
      <style:text-properties fo:font-size="14pt" officeooo:paragraph-rsid="000e3dce" style:font-size-asian="14pt" style:font-size-complex="14pt"/>
    </style:style>
    <style:style style:name="P5" style:family="paragraph" style:parent-style-name="Heading_20_3">
      <style:paragraph-properties fo:text-align="center" style:justify-single-word="false"/>
      <style:text-properties fo:font-size="21pt" officeooo:rsid="000e3dce" officeooo:paragraph-rsid="000e3dce" style:font-size-asian="21pt" style:font-size-complex="21pt"/>
    </style:style>
    <style:style style:name="P6" style:family="paragraph" style:parent-style-name="Heading_20_3"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0e3dce" officeooo:paragraph-rsid="000e3dce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rsid="000e3dce" officeooo:paragraph-rsid="000e3dc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02d6e" officeooo:paragraph-rsid="00102d6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102d6e" officeooo:paragraph-rsid="00102d6e"/>
    </style:style>
    <style:style style:name="P12" style:family="paragraph" style:parent-style-name="Standard">
      <style:paragraph-properties fo:text-align="center" style:justify-single-word="false"/>
      <style:text-properties fo:font-size="24pt" officeooo:rsid="00102d6e" officeooo:paragraph-rsid="00102d6e" style:font-size-asian="24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size="13pt" officeooo:rsid="00102d6e" officeooo:paragraph-rsid="00102d6e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3pt" fo:font-weight="bold" officeooo:rsid="00102d6e" officeooo:paragraph-rsid="00102d6e" style:font-size-asian="13pt" style:font-weight-asian="bold" style:font-size-complex="13pt" style:font-weight-complex="bold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fo:font-size="14pt" style:font-size-asian="14pt" style:font-size-complex="14pt"/>
    </style:style>
    <style:style style:name="P16" style:family="paragraph" style:parent-style-name="Text_20_body" style:list-style-name="L1">
      <style:text-properties fo:font-size="14pt" style:font-size-asian="14pt" style:font-size-complex="14pt"/>
    </style:style>
    <style:style style:name="P17" style:family="paragraph" style:parent-style-name="Text_20_body">
      <style:text-properties fo:font-size="14pt" style:font-size-asian="14pt" style:font-size-complex="14pt"/>
    </style:style>
    <style:style style:name="P18" style:family="paragraph" style:parent-style-name="Text_20_body">
      <style:text-properties fo:font-size="14pt" officeooo:rsid="000e3dce" officeooo:paragraph-rsid="000e3dce" style:font-size-asian="14pt" style:font-size-complex="14pt"/>
    </style:style>
    <style:style style:name="P19" style:family="paragraph" style:parent-style-name="Text_20_body">
      <style:text-properties fo:font-size="14pt" officeooo:paragraph-rsid="000e3dce" style:font-size-asian="14pt" style:font-size-complex="14pt"/>
    </style:style>
    <style:style style:name="P20" style:family="paragraph" style:parent-style-name="Text_20_body" style:list-style-name="L2">
      <style:paragraph-properties fo:margin-top="0in" fo:margin-bottom="0in" style:contextual-spacing="false"/>
      <style:text-properties fo:font-size="13pt" style:font-size-asian="13pt" style:font-size-complex="13pt"/>
    </style:style>
    <style:style style:name="P21" style:family="paragraph" style:parent-style-name="Text_20_body" style:list-style-name="L2">
      <style:text-properties fo:font-size="13pt" style:font-size-asian="13pt" style:font-size-complex="13pt"/>
    </style:style>
    <style:style style:name="P22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officeooo:rsid="00102d6e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officeooo:rsid="00108f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width="6.6528in" svg:height="3.7437in" draw:z-index="0"><draw:image xlink:href="Pictures/1000000000000688000003ADEB041BD1D405BEAA.png" xlink:type="simple" xlink:show="embed" xlink:actuate="onLoad" draw:mime-type="image/png"/></draw:frame>ABADDON</text:p>
      <text:h text:style-name="P1" text:outline-level="2">Gerador de Senhas Criptograficamente Seguras</text:h>
      <text:p text:style-name="Text_20_body"><text:span text:style-name="T1">O </text:span><text:span text:style-name="Strong_20_Emphasis"><text:span text:style-name="T1">Abaddon</text:span></text:span><text:span text:style-name="T1"> é um gerador de senhas criptograficamente seguras desenvolvido com foco em alta entropia, resistência a ataques de força bruta e transparência dos métodos utilizados para geração de credenciais.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2" text:anchor-type="char" svg:width="5.3571in" svg:height="2.3445in" draw:z-index="1"><draw:image xlink:href="Pictures/1000000000000179000000A52C28D7619722856F.png" xlink:type="simple" xlink:show="embed" xlink:actuate="onLoad" draw:mime-type="image/png"/></draw:frame><text:soft-page-break/></text:p>
      <text:p text:style-name="P7"/>
      <text:p text:style-name="P7"/>
      <text:p text:style-name="P7"/>
      <text:h text:style-name="P3" text:outline-level="2">Base para Entropia Real Baseada em Silício</text:h>
      <text:p text:style-name="P19">O projeto utiliza como fundamento fontes de entropia fornecidas pelo próprio sistema operacional, derivadas de eventos físicos observados pelo hardware do computador. Essas fontes incluem fenômenos eletrônicos e processos imprevisíveis coletados pelo kernel, permitindo a obtenção de números pseudoaleatórios criptograficamente segur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3"><draw:frame draw:style-name="fr2" draw:name="Image3" text:anchor-type="char" svg:x="0.2917in" svg:y="0.148in" svg:width="6.6528in" svg:height="3.1374in" draw:z-index="2"><draw:image xlink:href="Pictures/10000000000002AF00000144BCD612EEF099793E.png" xlink:type="simple" xlink:show="embed" xlink:actuate="onLoad" draw:mime-type="image/png"/></draw:frame><text:soft-page-break/></text:h>
      <text:h text:style-name="P5" text:outline-level="3"/>
      <text:h text:style-name="P5" text:outline-level="3">Características Principais</text:h>
      <text:list text:style-name="L1">
        <text:list-item>
          <text:p text:style-name="P15">Geração de senhas utilizando fontes de aleatoriedade criptograficamente seguras do sistema operacional.</text:p>
        </text:list-item>
        <text:list-item>
          <text:p text:style-name="P15">Suporte a diferentes conjuntos de caracteres, incluindo números, letras maiúsculas, letras minúsculas e símbolos especiais.</text:p>
        </text:list-item>
        <text:list-item>
          <text:p text:style-name="P15">Cálculo da força teórica da senha com base no universo de caracteres selecionado e no comprimento da senha.</text:p>
        </text:list-item>
        <text:list-item>
          <text:p text:style-name="P16">Implementação voltada para segurança, previsibilidade controlada e redução de vieses estatísticos durante a seleção dos caractere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4" text:anchor-type="char" svg:width="8.0563in" svg:height="2.0335in" draw:z-index="3"><draw:image xlink:href="Pictures/10000000000006360000012940BAE9A8DC1C635C.png" xlink:type="simple" xlink:show="embed" xlink:actuate="onLoad" draw:mime-type="image/png"/></draw:frame><text:soft-page-break/></text:p>
      <text:h text:style-name="P2" text:outline-level="2"/>
      <text:h text:style-name="P2" text:outline-level="2">Escopo e Objetivos do Projeto</text:h>
      <text:p text:style-name="P17"/>
      <text:p text:style-name="P17">Embora o Abaddon seja capaz de gerar senhas extremamente fortes para uso direto por usuários finais, este não é o foco principal do projeto em seu estado atual. A utilização de senhas longas e de alta entropia normalmente exige o suporte de um gerenciador de senhas para armazenamento e recuperação segura das credenciais, funcionalidade que ainda não faz parte do escopo desta implementação.</text:p>
      <text:p text:style-name="P17">Dessa forma, o projeto deve ser compreendido principalmente como uma demonstração prática de geração criptograficamente segura de credenciais, fundamentada em conceitos modernos de entropia, aleatoriedade e teoria da informação.</text:p>
      <text:p text:style-name="P17">O principal diferencial do Abaddon está em sua arquitetura simples, modular e facilmente extensível. A lógica de geração foi projetada para separar a origem da entropia, o cálculo do universo de caracteres e o processo de seleção dos símbolos, permitindo a manutenção e expansão do sistema com relativa facilidade.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3">Mapa visual de funcionamento:</text:span> </text:p>
      <text:p text:style-name="P7"/>
      <text:p text:style-name="P7"/>
      <text:p text:style-name="P7"><draw:frame draw:style-name="fr2" draw:name="Image5" text:anchor-type="char" svg:x="0.1354in" svg:y="0.1638in" svg:width="6.6528in" svg:height="4.5626in" draw:z-index="4"><draw:image xlink:href="Pictures/10000000000002FC0000020C013701A7234A52F6.png" xlink:type="simple" xlink:show="embed" xlink:actuate="onLoad" draw:mime-type="image/png"/></draw:frame></text:p>
      <text:p text:style-name="P9">A struct de conjunto armazena todos os dados referentes aos valores de cada conjunto. <text:line-break/><text:line-break/>Conjunto é o tipo de caractere escolhido pelo usuário, número, letra, alfanumerico e etc; Essa struct armazenara dados sobre o comprimento total, o próprio conjunto de universo, o nome e se está habilitado para uso. <text:s/>O universo é a soma do total de caracteres de cada conjunto que pode ser representado por N. </text:p>
      <text:p text:style-name="P9">Identificado o tamanho do universo a ser tratado para geração da senha, é passada como parâmetro para função de bits, necessários que aplica uma formula matematica de 2^(bits) para determinar quantas casas binárias possui o número que será retornado. </text:p>
      <text:p text:style-name="P9">A mascara recebera os bits em uma variável unsigned longlong de 64 caracteres possíveis representada em bits -1. <text:line-break/>A aleatoriedade foi colocada para ser gerada somente após todas essas etapas do código pois solicita-la no começo fatia com que valóres matematicamente sensiveis flutuassem nos processos do computador aguardando decisões do usuário. </text:p>
      <text:p text:style-name="P9">A partir desse momento o código segue uma escovação de bits para garantir que cada um seja dividido em 6 bits. E o motivo é o aproveitamento máximo da entropia gerada e maior aproximação das grandezas que serão mostradas mais a frente. </text:p>
      <text:p text:style-name="P7"><text:soft-page-break/></text:p>
      <text:p text:style-name="P7"><draw:frame draw:style-name="fr2" draw:name="Image6" text:anchor-type="char" svg:x="0.1193in" svg:y="0.0055in" svg:width="6.6528in" svg:height="3.9028in" draw:z-index="5"><draw:image xlink:href="Pictures/10000000000002EE000001B8E5373C417CFBF08A.png" xlink:type="simple" xlink:show="embed" xlink:actuate="onLoad" draw:mime-type="image/png"/></draw:frame></text:p>
      <text:p text:style-name="P7"/>
      <text:p text:style-name="P7"/>
      <text:p text:style-name="P7"/>
      <text:p text:style-name="P7">Continuando o raciocínio algoritmico, o rejection Sampling é a parte do código que valida se existirá problemas relacionados ao valor gerado. Pois se o usuário escolher um conjunto alfanumérico que contem 62 caracteres, este é o tamanho do universo definido. Mas ao transformar <text:s/>a analise da geração final da senha de byte a byte para bit a bit, 2^(bits) seria = a 64, então, caso o valor seja maior, o Rejection Sampling é responsável por descartar estes números restantes. </text:p>
      <text:p text:style-name="P7">Para obter o caractere, o algorimo faz uma varredura de indice pelo caractere real para aplica-lo no vetor da senha gerada. Este processo se repete até que o tamanho definido pelo usuário seja completamente validado e o laço seja interrompido. </text:p>
      <text:p text:style-name="P7"/>
      <text:h text:style-name="P4" text:outline-level="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7" text:anchor-type="char" svg:x="0.1043in" svg:y="-0.25in" svg:width="6.6528in" svg:height="4.5957in" draw:z-index="6"><draw:image xlink:href="Pictures/100000000000031F00000228560243FFFE36C05B.png" xlink:type="simple" xlink:show="embed" xlink:actuate="onLoad" draw:mime-type="image/png"/></draw:frame><text:soft-page-break/></text:p>
      <text:p text:style-name="P17"/>
      <text:h text:style-name="P6" text:outline-level="3">Fundamentos</text:h>
      <text:list text:style-name="L2">
        <text:list-item>
          <text:p text:style-name="P20">Utilização de mecanismos modernos de geração de números aleatórios do sistema operacional.</text:p>
        </text:list-item>
        <text:list-item>
          <text:p text:style-name="P20">Entropia derivada de eventos físicos coletados pelo hardware.</text:p>
        </text:list-item>
        <text:list-item>
          <text:p text:style-name="P20">Dependência de fontes reais de aleatoriedade para inicialização do gerador criptográfico.</text:p>
        </text:list-item>
        <text:list-item>
          <text:p text:style-name="P21">Segurança fundamentada em princípios utilizados por sistemas operacionais modernos e aplicações de segurança profissionais.</text:p>
        </text:list-item>
      </text:list>
      <text:p text:style-name="P22"/>
      <text:p text:style-name="Text_20_body">O nome <text:span text:style-name="Strong_20_Emphasis">Abaddon</text:span> faz referência à entidade associada ao abismo e à provação. Da mesma forma, o projeto tem como objetivo criar senhas capazes de resistir aos testes mais rigorosos de segurança, desafiando ataques computacionais através da combinação entre alta entropia, comprimento elevado e geração criptograficamente segura.</text:p>
      <text:p text:style-name="P18"/>
      <text:p text:style-name="P18">* Todo o princício teorico do projeto se deu pelo estudo da hive-system sobre o poder computacional necessário para se quebrar uma senha. Dentro da pasta imagens no projeto, se concentram de mais variados tipos testes que fizeram e uma extença busca por fundamentos técnicos para o desenvolvimento do projeto para além de um <text:soft-page-break/>simpres pedaço de código para completar uma task. Porém um trabalho real que mostra o processo correto de se inicializar uma senha segura <text:span text:style-name="T4">por este MVP. Não se recomenda ainda a utilização do projeto para fins profisionais pois necessita de revisão técnica e forma adequada de armazenamento segura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Limitação Técnica </text:p>
      <text:p text:style-name="P7"/>
      <text:p text:style-name="P7"/>
      <text:p text:style-name="P11"/>
      <text:p text:style-name="P11"/>
      <text:p text:style-name="P11"><draw:frame draw:style-name="fr1" draw:name="Image8" text:anchor-type="char" svg:width="6.6528in" svg:height="2.9043in" draw:z-index="7"><draw:image xlink:href="Pictures/10000000000002FD0000014EF21A67F6AA9B7891.png" xlink:type="simple" xlink:show="embed" xlink:actuate="onLoad" draw:mime-type="image/png"/></draw:frame>-<text:span text:style-name="T2"> Limitado a sistemas operacionais linux</text:span></text:p>
      <text:p text:style-name="P10">- Versões acima de 3,17</text:p>
      <text:p text:style-name="P11">A<text:span text:style-name="T5">tualmente o sistema atende exclusivamene a sistemas operacionais linux devido a sua forma de funcionamento e integração com o kernel. O método de captura de aleatoriedade atravez de uma função de biblioteca externa é mais moderno, mas em contrapartida sacrificou a compatibilidade com kernel de versões inferiores a 3.17. <text:line-break/>Além dessa limitação, vou apresentar a outra limitação mostrada e mal interpretada de diversas formas pelos usuádios de geradores de senhas. </text:span></text:p>
      <text:p text:style-name="P13"/>
      <text:p text:style-name="P14">- Calculo de força de senhas só tem eficácia com entropia segura</text:p>
      <text:p text:style-name="P14">- O software não é imune a reutilização de senhas pelo usuário, use com sabedoria</text:p>
      <text:p text:style-name="P14">- O calculo de força de entropia, não funciona senhas geradas por humanos</text:p>
      <text:p text:style-name="P14">- </text:p>
      <text:p text:style-name="P14">Calculo de força de senhas padrão <text:span text:style-name="T6">C = N^(x) </text:span>, medem o número maximo de tentativas para serem quebradas, e não refletem <text:s/>necessáriamente o tempo real gasto na quebra da senha. Portanto, não se confunda com números. A sua grandeza se baixa, revela na verdade risco de segurança critico ou moderado. </text:p>
      <text:p text:style-name="P14"/>
      <text:p text:style-name="P14">- <text:span text:style-name="T6">O projeto apresentado é limitado, e apresentado por desenvolvimento continuo para o ganho de conhecimento. Feito por alguém com limitações técnicas, limitação de tempo e adversidades. Como consequencia o código poderá apresentar falhas não percebidas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4T10:45:08.061609279</meta:creation-date>
    <dc:date>2026-06-14T14:32:48.206202690</dc:date>
    <meta:editing-duration>PT3H41M33S</meta:editing-duration>
    <meta:editing-cycles>3</meta:editing-cycles>
    <meta:generator>LibreOffice/7.4.7.2$Linux_X86_64 LibreOffice_project/40$Build-2</meta:generator>
    <meta:document-statistic meta:table-count="0" meta:image-count="8" meta:object-count="0" meta:page-count="10" meta:paragraph-count="38" meta:word-count="1029" meta:character-count="6713" meta:non-whitespace-character-count="5711"/>
  </office:meta>
</office:document-meta>
</file>